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Heading_20_4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>
      <style:paragraph-properties fo:margin-left="0.1252in" fo:margin-right="0in" fo:text-indent="0in" style:auto-text-indent="fals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14" style:family="paragraph" style:parent-style-name="Text_20_body">
      <style:paragraph-properties fo:margin-top="0in" fo:margin-bottom="0in" style:contextual-spacing="false"/>
      <style:text-properties loext:padding="0in" loext:border="non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in" fo:margin-bottom="0in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in" fo:margin-bottom="0in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in" fo:margin-bottom="0in" style:contextual-spacing="false"/>
    </style:style>
    <style:style style:name="P27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 style:list-style-name="L9">
      <style:paragraph-properties fo:margin-left="0in" fo:margin-right="0in" fo:text-indent="0in" style:auto-text-indent="false"/>
    </style:style>
    <style:style style:name="P29" style:family="paragraph" style:parent-style-name="Text_20_body" style:master-page-name="HTML">
      <style:paragraph-properties fo:margin-left="0in" fo:margin-right="0in" fo:text-indent="0in" style:auto-text-indent="false" style:page-number="auto"/>
      <style:text-properties officeooo:rsid="0009f8d2" officeooo:paragraph-rsid="0009f8d2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font-size="14pt" officeooo:rsid="0009f8d2" officeooo:paragraph-rsid="0009f8d2" style:font-size-asian="14pt" style:font-size-complex="14pt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fo:color="#3faf46" loext:opacity="100%" fo:font-size="24pt" officeooo:rsid="0009f8d2" officeooo:paragraph-rsid="0009f8d2" style:font-size-asian="24pt" style:font-size-complex="24pt"/>
    </style:style>
    <style:style style:name="P32" style:family="paragraph" style:parent-style-name="Text_20_body">
      <style:text-properties fo:background-color="#ffb66c"/>
    </style:style>
    <style:style style:name="T1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..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../../../../../../../search/feedback" xlink:type="simple">
          <form:properties>
            <form:property form:property-name="PropertyChangeNotificationEnabled" office:value-type="boolean" office:boolean-value="true"/>
          </form:properties>
          <form:hidden form:name="authenticity_token" form:control-implementation="ooo:com.sun.star.form.component.HiddenControl" xml:id="control1" form:id="control1" form:value="HnLy5M9fJBwMsabbhjGnPOKL4zYcR0VQMkG96RhtMjne5vW8jajfjlUs-jL2h5RfdLVhpBIHQB7x0atNdPKhrA"/>
        </form:form>
        <form:form form:apply-filter="true" form:method="post" form:control-implementation="ooo:com.sun.star.form.component.Form" office:target-frame="" xlink:href="../../../../../../../../../../../../search/custom_scopes" xlink:type="simple">
          <form:properties>
            <form:property form:property-name="PropertyChangeNotificationEnabled" office:value-type="boolean" office:boolean-value="true"/>
          </form:properties>
          <form:hidden form:name="authenticity_token" form:control-implementation="ooo:com.sun.star.form.component.HiddenControl" xml:id="control2" form:id="control2" form:value="8tWWFxQ-Gac_7EMyOHtfXA_NesouBADL2LqmMvpojcDxnjJV3YbLhZGTtG4U8csTcHAXrtGOiorLRD7KGYNbaQ"/>
          <form:hidden form:name="custom_scope_id" form:control-implementation="ooo:com.sun.star.form.component.HiddenControl" xml:id="control3" form:id="control3"/>
          <form:hidden form:control-implementation="ooo:com.sun.star.form.component.HiddenControl" xml:id="control4" form:id="control4" form:value="z6ayunJTiQukwTQlfWzuimW4NliY3hnpU6HsaXHeSISuzmO5eKX7C_cxMT5khiGA7klaPOZY5EWRMDBJG8nP4Q"/>
        </form:form>
        <form:form form:apply-filter="true" form:method="post" form:control-implementation="ooo:com.sun.star.form.component.Form" office:target-frame="" xlink:href="../../../../../../../../../../../../session" xlink:type="simple">
          <form:properties>
            <form:property form:property-name="PropertyChangeNotificationEnabled" office:value-type="boolean" office:boolean-value="true"/>
          </form:properties>
          <form:hidden form:name="authenticity_token" form:control-implementation="ooo:com.sun.star.form.component.HiddenControl" xml:id="control5" form:id="control5" form:value="7j0jUU5CZbTVnDCQycIFjlT1DOMyokcCL_WXK5swBm8EgtzpwmRfzsoaXomS1hOJ6Nd3Y3Ag8AExNs_vfjS3_g"/>
          <form:hidden form:name="add_account" form:control-implementation="ooo:com.sun.star.form.component.HiddenControl" xml:id="control6" form:id="control6"/>
          <form:hidden form:name="webauthn-conditional" form:control-implementation="ooo:com.sun.star.form.component.HiddenControl" xml:id="control7" form:id="control7" form:value="undefined"/>
          <form:hidden form:name="javascript-support" form:control-implementation="ooo:com.sun.star.form.component.HiddenControl" xml:id="control8" form:id="control8" form:value="unknown"/>
          <form:hidden form:name="webauthn-support" form:control-implementation="ooo:com.sun.star.form.component.HiddenControl" xml:id="control9" form:id="control9" form:value="unknown"/>
          <form:hidden form:name="webauthn-iuvpaa-support" form:control-implementation="ooo:com.sun.star.form.component.HiddenControl" xml:id="control10" form:id="control10" form:value="unknown"/>
          <form:hidden form:name="return_to" form:control-implementation="ooo:com.sun.star.form.component.HiddenControl" xml:id="control11" form:id="control11" form:value="https://github.com/OpenOffice/example-odt/raw/master/example.odt"/>
          <form:hidden form:name="allow_signup" form:control-implementation="ooo:com.sun.star.form.component.HiddenControl" xml:id="control12" form:id="control12"/>
          <form:hidden form:name="client_id" form:control-implementation="ooo:com.sun.star.form.component.HiddenControl" xml:id="control13" form:id="control13"/>
          <form:hidden form:name="integration" form:control-implementation="ooo:com.sun.star.form.component.HiddenControl" xml:id="control14" form:id="control14"/>
          <form:hidden form:name="timestamp" form:control-implementation="ooo:com.sun.star.form.component.HiddenControl" xml:id="control15" form:id="control15" form:value="1778339705247"/>
          <form:hidden form:name="timestamp_secret" form:control-implementation="ooo:com.sun.star.form.component.HiddenControl" xml:id="control16" form:id="control16" form:value="2eb8b27e5ecd6942e0ab01ee26186de3c1e909ce5d0fb97980f7256fba51bfe9"/>
        </form:form>
        <form:form form:apply-filter="true" form:control-implementation="ooo:com.sun.star.form.component.Form" office:target-frame="" xlink:href="../../../../../../../../../../../..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is is sample office file</text:p>
      <text:p text:style-name="P30">This is sample office file</text:p>
      <text:p text:style-name="P31">This is sample office file</text:p>
      <text:p text:style-name="P32">This is sample office file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urce Han Serif SC" style:font-family-asian="'Source Han Serif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witch</dc:title>
    <dc:description>GitHub is where people build software. More than 150 million people use GitHub to discover, fork, and contribute to over 420 million projects.</dc:description>
    <dc:date>2026-05-10T09:29:19.490662791</dc:date>
    <meta:editing-duration>PT2M35S</meta:editing-duration>
    <meta:editing-cycles>1</meta:editing-cycles>
    <meta:document-statistic meta:table-count="0" meta:image-count="0" meta:object-count="0" meta:page-count="1" meta:paragraph-count="4" meta:word-count="20" meta:character-count="104" meta:non-whitespace-character-count="88"/>
    <meta:generator>LibreOffice/24.2.0.3$Linux_X86_64 LibreOffice_project/420$Build-3</meta:generator>
    <meta:user-defined meta:name=""/>
    <meta:user-defined meta:name="apple-itunes-app">app-id=1477376905, app-argument=https://github.com/OpenOffice/example-odt/raw/master/example.odt</meta:user-defined>
    <meta:user-defined meta:name="browser-errors-url">https://api.github.com/_private/browser/errors</meta:user-defined>
    <meta:user-defined meta:name="browser-stats-url">https://api.github.com/_private/browser/stats</meta:user-defined>
    <meta:user-defined meta:name="color-scheme" meta:value-type="string">light dark</meta:user-defined>
    <meta:user-defined meta:name="current-catalog-service-hash" meta:value-type="string">f3abb0cc802f3d7b95fc8762b94bdcb13bf39634c40c357301c4aa1d67a256fb</meta:user-defined>
    <meta:user-defined meta:name="disable-turbo" meta:value-type="string">false</meta:user-defined>
    <meta:user-defined meta:name="expected-hostname" meta:value-type="string">github.com</meta:user-defined>
    <meta:user-defined meta:name="fetch-nonce" meta:value-type="string">v2:6499b478-a33a-76e6-d429-6f993969da0f</meta:user-defined>
    <meta:user-defined meta:name="github-keyboard-shortcuts" meta:value-type="string">copilot</meta:user-defined>
    <meta:user-defined meta:name="google-site-verification" meta:value-type="string">Apib7-x98H0j5cPqHWwSMm6dNU4GmODRoqxLiDzdx9I</meta:user-defined>
    <meta:user-defined meta:name="hostname" meta:value-type="string">github.com</meta:user-defined>
    <meta:user-defined meta:name="html-safe-nonce" meta:value-type="string">7936143c047c7575a3fdd49136a5478273a1c8b770caf0cdfa03b5060bb463e2</meta:user-defined>
    <meta:user-defined meta:name="is_logged_out_page" meta:value-type="string">true</meta:user-defined>
    <meta:user-defined meta:name="octolytics-page-type" meta:value-type="string">marketing</meta:user-defined>
    <meta:user-defined meta:name="octolytics-url" meta:value-type="string">https://collector.github.com/github/collect</meta:user-defined>
    <meta:user-defined meta:name="release" meta:value-type="string">2473ec6c6aa87f38946284d51289219fd0b87264</meta:user-defined>
    <meta:user-defined meta:name="request-id" meta:value-type="string">5021:1BAEB9:14FE904:1783ED3:69FF4F78</meta:user-defined>
    <meta:user-defined meta:name="route-action" meta:value-type="string">raw</meta:user-defined>
    <meta:user-defined meta:name="route-controller" meta:value-type="string">blob</meta:user-defined>
    <meta:user-defined meta:name="route-pattern" meta:value-type="string">/:user_id/:repository/raw/*name(/*path)</meta:user-defined>
    <meta:user-defined meta:name="selected-link" meta:value-type="string"/>
    <meta:user-defined meta:name="theme-color" meta:value-type="string">#1e2327</meta:user-defined>
    <meta:user-defined meta:name="turbo-body-classes" meta:value-type="string">logged-out env-production page-responsive min-height-full d-flex flex-column</meta:user-defined>
    <meta:user-defined meta:name="turbo-cache-control" meta:value-type="string">no-preview</meta:user-defined>
    <meta:user-defined meta:name="ui-target" meta:value-type="string">full</meta:user-defined>
    <meta:user-defined meta:name="user-login" meta:value-type="string"/>
    <meta:user-defined meta:name="viewport" meta:value-type="string">width=device-width</meta:user-defined>
    <meta:user-defined meta:name="visitor-hmac" meta:value-type="string">983711d298df7c248e0e92bcd0b76cfa0d13a32a0b3f0897845f734e2b3830d0</meta:user-defined>
    <meta:user-defined meta:name="visitor-payload" meta:value-type="string">eyJyZWZlcnJlciI6bnVsbCwicmVxdWVzdF9pZCI6IjUwMjE6MUJBRUI5OjE0RkU5MDQ6MTc4M0VEMzo2OUZGNEY3OCIsInZpc2l0b3JfaWQiOiI4Mjg2NzQxMzk3Njc1OTIxMjczIiwicmVnaW9uX2VkZ2UiOiJzb3V0aGVhc3Rhc2lhIiwicmVnaW9uX3JlbmRlciI6ImlhZCJ9</meta:user-defined>
  </office:meta>
</office:document-meta>
</file>